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e3e" officeooo:paragraph-rsid="00049e3e"/>
    </style:style>
    <style:style style:name="P2" style:family="paragraph" style:parent-style-name="Standard">
      <style:text-properties officeooo:rsid="0004da6b" officeooo:paragraph-rsid="0004da6b"/>
    </style:style>
    <style:style style:name="P3" style:family="paragraph" style:parent-style-name="Standard">
      <style:text-properties fo:font-weight="bold" officeooo:rsid="0004da6b" officeooo:paragraph-rsid="0004da6b" style:font-weight-asian="bold" style:font-weight-complex="bold"/>
    </style:style>
    <style:style style:name="P4" style:family="paragraph" style:parent-style-name="Standard" style:list-style-name="L1">
      <style:text-properties officeooo:rsid="00049e3e" officeooo:paragraph-rsid="00049e3e"/>
    </style:style>
    <style:style style:name="P5" style:family="paragraph" style:parent-style-name="Standard">
      <style:text-properties officeooo:rsid="0005a7e0" officeooo:paragraph-rsid="0005a7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rak kudeatzeko kalkulu orriaren egitura</text:p>
      <text:p text:style-name="P1"/>
      <text:p text:style-name="P2">2020, 2021 eta 2022 Vueltako porra bakarrik.</text:p>
      <text:p text:style-name="P2">2023tik aurrera hiru handiak.</text:p>
      <text:p text:style-name="P2"/>
      <text:p text:style-name="P1"/>
      <text:p text:style-name="P1">Kalkulu orria hobetzen eta eboluzionatzen joan da baina oinarri batetik. Lehenik oinarria azalduko da eta gero urtez urteko ezberdintasunak.</text:p>
      <text:p text:style-name="P1"/>
      <text:p text:style-name="P3">Oinarria</text:p>
      <text:p text:style-name="P2"/>
      <text:p text:style-name="P1">Porra kalkulu orriak ondorengo orriak ditu:</text:p>
      <text:p text:style-name="P1"/>
      <text:list text:style-name="L1">
        <text:list-item>
          <text:p text:style-name="P4">“Etapak”: bertan etapa bakoitzeko sailkapenak zeintzuk diren agertzen da.</text:p>
          <text:p text:style-name="P4"/>
        </text:list-item>
        <text:list-item>
          <text:p text:style-name="P4">“Porralariak”: Bertan porra bakoitzak zein txirrindulari dituen agertzen da eta etapa bakoiztean txirrindulari bakoitzak atera dituen puntuak. Porra izenaren gelaxka azpian porrak dituen puntuak daude.</text:p>
          <text:p text:style-name="P4"/>
        </text:list-item>
        <text:list-item>
          <text:p text:style-name="P4">“Txirrindulariak”: Oinarrizko <text:s/>taula da, bertan txirrindulari bakoitzaren dortsal (ID) eta izen zerrenda dago eta txirrindulari bakoitzak etapa bakoitzean atera dituen puntuak.</text:p>
          <text:p text:style-name="P4"/>
        </text:list-item>
        <text:list-item>
          <text:p text:style-name="P4">“Sailkapen taula handiak”: orri honetan taula bi daude, lehengoan porra bakoitzak etapa bakloitzean zenbat puntu zituen adierazten du eta bigarrenean porra bakoitza etapa bakoitzean zen sailkapen zuen esaten du.</text:p>
        </text:list-item>
      </text:list>
      <text:p text:style-name="P1"/>
      <text:p text:style-name="P1">Grafika orriei ezikusia egin.</text:p>
      <text:p text:style-name="P1"/>
      <text:p text:style-name="P2"/>
      <text:p text:style-name="P3">Orrien eboluzioa eta berezitasunak</text:p>
      <text:p text:style-name="P2"/>
      <text:p text:style-name="P2">2023ko vueltan inprimatzeko bakarrik diren porralari eta txirrindulari orriak gehitzen dira, ez dute beste funtziorik, ezikusia egin.</text:p>
      <text:p text:style-name="P2"/>
      <text:p text:style-name="P2">2024ko Giroan “Porra dena” izena duen orria gehitzen da, porra denak txirrindulari bakoitzak eman dituen puntuekin orri inprimagarri bat ateratzeko besterik ez da.</text:p>
      <text:p text:style-name="P2"/>
      <text:p text:style-name="P5">2025eko tour porrak oinarri berdina dauka baina “Laburpen taulak” orria sortzen da sailkapenak erakusteko.</text:p>
      <text:p text:style-name="P5"/>
      <text:p text:style-name="P5">Litekeena da beste orriren bat izatea baina ez zaio kasurik egin behar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14:42:21.082737164</meta:creation-date>
    <dc:date>2026-06-21T15:22:59.337814408</dc:date>
    <meta:editing-duration>PT7M20S</meta:editing-duration>
    <meta:editing-cycles>1</meta:editing-cycles>
    <meta:document-statistic meta:table-count="0" meta:image-count="0" meta:object-count="0" meta:page-count="1" meta:paragraph-count="16" meta:word-count="204" meta:character-count="1511" meta:non-whitespace-character-count="1326"/>
    <meta:generator>LibreOffice/26.2.4.2$Linux_X86_64 LibreOffice_project/620$Build-2</meta:generator>
  </office:meta>
</office:document-meta>
</file>